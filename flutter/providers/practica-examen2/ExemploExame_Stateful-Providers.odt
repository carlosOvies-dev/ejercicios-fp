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2000003852E0909E88D83AF18.png" manifest:media-type="image/png"/>
  <manifest:file-entry manifest:full-path="Pictures/10000000000001B500000384E28F509E22407F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0ed" officeooo:paragraph-rsid="000200e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00ed" officeooo:paragraph-rsid="000200e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0200ed" officeooo:paragraph-rsid="000200ed" style:font-size-asian="14pt" style:font-size-complex="14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200ed" officeooo:paragraph-rsid="000200e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200ed" officeooo:paragraph-rsid="000348b3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348b3" officeooo:paragraph-rsid="000348b3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paragraph-rsid="000348b3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officeooo:paragraph-rsid="000200ed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officeooo:rsid="000348b3" officeooo:paragraph-rsid="000348b3"/>
    </style:style>
    <style:style style:name="P10" style:family="paragraph" style:parent-style-name="Standard">
      <style:paragraph-properties fo:margin-left="3.752cm" fo:margin-right="0cm" fo:text-indent="0cm" style:auto-text-indent="false"/>
      <style:text-properties officeooo:rsid="000348b3" officeooo:paragraph-rsid="000348b3"/>
    </style:style>
    <style:style style:name="P11" style:family="paragraph" style:parent-style-name="Standard">
      <style:paragraph-properties fo:margin-left="3.752cm" fo:margin-right="0cm" fo:text-indent="0cm" style:auto-text-indent="false"/>
      <style:text-properties officeooo:rsid="00051854" officeooo:paragraph-rsid="00051854"/>
    </style:style>
    <style:style style:name="P12" style:family="paragraph" style:parent-style-name="Standard">
      <style:paragraph-properties fo:margin-left="3.752cm" fo:margin-right="0cm" fo:text-indent="0cm" style:auto-text-indent="false"/>
      <style:text-properties officeooo:rsid="00067e98" officeooo:paragraph-rsid="00067e98"/>
    </style:style>
    <style:style style:name="T1" style:family="text">
      <style:text-properties officeooo:rsid="000200e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348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MPLO DE EXAME PROVIDER-STATELESSWIDGET-STATEFULWIDGET.</text:p>
      <text:p text:style-name="P3"/>
      <text:p text:style-name="P1"/>
      <text:p text:style-name="P1">Emprega rutas para pasar dunha pantalla a outra.</text:p>
      <text:p text:style-name="P1"/>
      <text:p text:style-name="P1"><text:span text:style-name="T2">PRIMERA PANTALLA:</text:span><text:line-break/><draw:frame draw:style-name="fr2" draw:name="Imagen1" text:anchor-type="char" svg:x="3.981cm" svg:y="0.931cm" svg:width="9.038cm" svg:height="18.817cm" draw:z-index="0"><draw:image xlink:href="Pictures/10000000000001B500000384E28F509E22407F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uncionamento:</text:p>
      <text:p text:style-name="P4">Consta na AppBar de dous contadores de click´s, un por cada IconButton. Cada vez que se preme nun IconButton, o contador correspondente se incrementa. Terasre en conta a reutilización de código, é dicir, non ter o código repetido para cada contador.</text:p>
      <text:p text:style-name="P4"><text:soft-page-break/>Cada vez que se preme nun IconButton:</text:p>
      <text:p text:style-name="P8"><text:span text:style-name="T1">O contador correspondente se incrementa</text:span></text:p>
      <text:p text:style-name="P8"><text:span text:style-name="T1">O tamaño do contenedor verde cambia. Se se preme o IconButton da esquerda aumenta de tamaña en 20 unidades cada vez (alto e ancho) . Se prememos no da dereita o tamaño decrece en 20 unidades.</text:span></text:p>
      <text:p text:style-name="P9">O iconbutton cambia de icona</text:p>
      <text:p text:style-name="P7"><text:span text:style-name="T1">Terasre en conta a reutilización de código, é dicir, non ter o código repetido para cada </text:span><text:span text:style-name="T3">IconButton</text:span><text:span text:style-name="T1">.</text:span></text:p>
      <text:p text:style-name="P5"/>
      <text:p text:style-name="P7"><text:span text:style-name="T3">Ao facer doubleclick sobre o contenedor verde, aparece a segunda pantalla:</text:span></text:p>
      <text:p text:style-name="P6"/>
      <text:p text:style-name="P6"/>
      <text:p text:style-name="P6"><draw:frame draw:style-name="fr1" draw:name="Imagen2" text:anchor-type="char" svg:width="9.186cm" svg:height="19.071cm" draw:z-index="1"><draw:image xlink:href="Pictures/10000000000001B2000003852E0909E88D83AF18.png" xlink:type="simple" xlink:show="embed" xlink:actuate="onLoad" draw:mime-type="image/png"/></draw:frame></text:p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parece no title, o tamaño do container pasado como parámetro.</text:p>
      <text:p text:style-name="P9">Unha lista de datos de tipo String.</text:p>
      <text:p text:style-name="P9">Os elementos que conforman non son ListTile, son Container cun texto interior.</text:p>
      <text:p text:style-name="P9">Ao facer double click sobre o elemento da lista, o elemento se borra.</text:p>
      <text:p text:style-name="P9">Se facemos click sobre calquera elemento da lista, pechamos a segunda pantalla e aparece a primeira.</text:p>
      <text:p text:style-name="P9"/>
      <text:p text:style-name="P9">Emprega o provider cós datos e métodos que consideres necesario, tendo en conta que:</text:p>
      <text:p text:style-name="P10">O cambio de estado do IconButton non se garda no provider.</text:p>
      <text:p text:style-name="P10">Os textos que contan o número de click´s deben estar definidos dentro do Widget Scaffold.</text:p>
      <text:p text:style-name="P12">O contenedor e o IconButton están definidos en Widgets separados.</text:p>
      <text:p text:style-name="P11">Debes intentar que se redibuxen a cantidade mínima de Widgets e o menor número de veces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20:48:53.453000000</meta:creation-date>
    <dc:date>2022-12-02T21:33:58.597000000</dc:date>
    <meta:editing-duration>PT4M25S</meta:editing-duration>
    <meta:editing-cycles>2</meta:editing-cycles>
    <meta:generator>LibreOffice/7.0.3.1$Windows_X86_64 LibreOffice_project/d7547858d014d4cf69878db179d326fc3483e082</meta:generator>
    <meta:document-statistic meta:table-count="0" meta:image-count="2" meta:object-count="0" meta:page-count="3" meta:paragraph-count="21" meta:word-count="261" meta:character-count="1583" meta:non-whitespace-character-count="1342"/>
  </office:meta>
</office:document-meta>
</file>